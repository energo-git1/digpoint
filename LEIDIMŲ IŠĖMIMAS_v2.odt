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Įprastasis" style:master-page-name="MP0" style:family="paragraph">
      <style:paragraph-properties fo:break-before="page" fo:margin-bottom="0in"/>
      <style:text-properties style:font-name="Times New Roman" fo:font-weight="bold" style:font-weight-asian="bold" style:font-weight-complex="bold" fo:language="lt" fo:country="LT"/>
    </style:style>
    <style:style style:name="P2" style:parent-style-name="Įprastasis" style:family="paragraph">
      <style:paragraph-properties fo:margin-bottom="0in"/>
      <style:text-properties fo:font-weight="bold" style:font-weight-asian="bold" style:font-weight-complex="bold" fo:language="lt" fo:country="LT"/>
    </style:style>
    <style:style style:name="P3" style:parent-style-name="Įprastasis" style:family="paragraph">
      <style:paragraph-properties fo:margin-bottom="0in"/>
      <style:text-properties fo:font-weight="bold" style:font-weight-asian="bold" style:font-weight-complex="bold" fo:language="lt" fo:country="LT"/>
    </style:style>
    <style:style style:name="P4" style:parent-style-name="Įprastasis" style:family="paragraph">
      <style:paragraph-properties fo:margin-bottom="0in"/>
    </style:style>
    <style:style style:name="T5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7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8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9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0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11" style:parent-style-name="Įprastasis" style:family="paragraph">
      <style:paragraph-properties fo:margin-bottom="0in"/>
    </style:style>
    <style:style style:name="T12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3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15" style:parent-style-name="Įprastasis" style:family="paragraph">
      <style:paragraph-properties fo:margin-bottom="0in" fo:margin-left="0.5in">
        <style:tab-stops/>
      </style:paragraph-properties>
    </style:style>
    <style:style style:name="T1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7" style:parent-style-name="Numatytasispastraiposšriftas" style:family="text">
      <style:text-properties style:font-name="Times New Roman" fo:font-size="14pt" style:font-size-asian="14pt" style:font-size-complex="14pt" fo:background-color="#FFFF00" fo:language="lt" fo:country="LT"/>
    </style:style>
    <style:style style:name="T18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9" style:parent-style-name="Hipersaitas" style:family="text">
      <style:text-properties style:font-name="Times New Roman" fo:font-size="14pt" style:font-size-asian="14pt" style:font-size-complex="14pt" fo:language="lt" fo:country="LT"/>
    </style:style>
    <style:style style:name="P20" style:parent-style-name="Įprastasis" style:family="paragraph">
      <style:paragraph-properties fo:margin-bottom="0in" fo:margin-left="0.5in" fo:text-indent="0.5in">
        <style:tab-stops/>
      </style:paragraph-properties>
    </style:style>
    <style:style style:name="T21" style:parent-style-name="Numatytasispastraiposšriftas" style:family="text">
      <style:text-properties style:font-name="Times New Roman" fo:font-size="14pt" style:font-size-asian="14pt" style:font-size-complex="14pt" fo:background-color="#FFFF00" fo:language="lt" fo:country="LT"/>
    </style:style>
    <style:style style:name="T22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23" style:parent-style-name="Hipersaitas" style:family="text">
      <style:text-properties style:font-name="Times New Roman" fo:font-size="14pt" style:font-size-asian="14pt" style:font-size-complex="14pt" fo:language="lt" fo:country="LT"/>
    </style:style>
    <style:style style:name="T2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25" style:parent-style-name="Įprastasis" style:family="paragraph">
      <style:paragraph-properties fo:margin-bottom="0in"/>
    </style:style>
    <style:style style:name="T26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27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28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29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30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31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32" style:parent-style-name="Įprastasis" style:family="paragraph">
      <style:paragraph-properties fo:margin-bottom="0in"/>
    </style:style>
    <style:style style:name="T33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3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35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3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37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38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39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40" style:parent-style-name="Hipersaitas" style:family="text">
      <style:text-properties style:font-name="Times New Roman" fo:font-size="14pt" style:font-size-asian="14pt" style:font-size-complex="14pt" fo:language="lt" fo:country="LT"/>
    </style:style>
    <style:style style:name="T41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42" style:parent-style-name="Įprastasis" style:family="paragraph">
      <style:paragraph-properties fo:margin-bottom="0in"/>
    </style:style>
    <style:style style:name="T43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4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45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4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47" style:parent-style-name="Įprastasis" style:family="paragraph">
      <style:paragraph-properties fo:margin-bottom="0in"/>
    </style:style>
    <style:style style:name="T48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49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50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51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52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53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54" style:parent-style-name="Įprastasis" style:family="paragraph">
      <style:paragraph-properties fo:margin-bottom="0in"/>
    </style:style>
    <style:style style:name="T55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5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57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58" style:parent-style-name="Hipersaitas" style:family="text">
      <style:text-properties style:font-name="Times New Roman" fo:font-size="14pt" style:font-size-asian="14pt" style:font-size-complex="14pt" fo:language="lt" fo:country="LT"/>
    </style:style>
    <style:style style:name="P59" style:parent-style-name="Įprastasis" style:family="paragraph">
      <style:paragraph-properties fo:margin-bottom="0in"/>
    </style:style>
    <style:style style:name="T60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61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62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63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6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65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66" style:parent-style-name="Įprastasis" style:family="paragraph">
      <style:paragraph-properties fo:margin-bottom="0in"/>
    </style:style>
    <style:style style:name="T67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68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69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70" style:parent-style-name="Įprastasis" style:family="paragraph">
      <style:paragraph-properties fo:margin-bottom="0in"/>
    </style:style>
    <style:style style:name="T71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72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73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74" style:parent-style-name="Įprastasis" style:family="paragraph">
      <style:paragraph-properties fo:margin-bottom="0in"/>
    </style:style>
    <style:style style:name="T75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7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77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78" style:parent-style-name="Įprastasis" style:family="paragraph">
      <style:paragraph-properties fo:margin-bottom="0in"/>
    </style:style>
    <style:style style:name="T79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80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81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82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83" style:parent-style-name="Hipersaitas" style:family="text">
      <style:text-properties style:font-name="Times New Roman" fo:font-size="14pt" style:font-size-asian="14pt" style:font-size-complex="14pt" fo:language="lt" fo:country="LT"/>
    </style:style>
    <style:style style:name="P84" style:parent-style-name="Įprastasis" style:family="paragraph">
      <style:paragraph-properties fo:margin-bottom="0in"/>
    </style:style>
    <style:style style:name="T85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8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87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88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89" style:parent-style-name="Įprastasis" style:family="paragraph">
      <style:paragraph-properties fo:margin-bottom="0in"/>
    </style:style>
    <style:style style:name="T90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91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92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93" style:parent-style-name="Hipersaitas" style:family="text">
      <style:text-properties style:font-name="Times New Roman" fo:font-size="14pt" style:font-size-asian="14pt" style:font-size-complex="14pt"/>
    </style:style>
    <style:style style:name="P94" style:parent-style-name="Įprastasis" style:family="paragraph">
      <style:paragraph-properties fo:margin-bottom="0in"/>
    </style:style>
    <style:style style:name="T95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9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97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98" style:parent-style-name="Įprastasis" style:family="paragraph">
      <style:paragraph-properties fo:margin-bottom="0in"/>
    </style:style>
    <style:style style:name="T99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00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01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102" style:parent-style-name="Įprastasis" style:family="paragraph">
      <style:paragraph-properties fo:margin-bottom="0in"/>
    </style:style>
    <style:style style:name="T103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0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05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0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107" style:parent-style-name="Įprastasis" style:family="paragraph">
      <style:paragraph-properties fo:margin-bottom="0in"/>
    </style:style>
    <style:style style:name="T108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09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10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11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P112" style:parent-style-name="Įprastasis" style:family="paragraph">
      <style:paragraph-properties fo:margin-bottom="0in"/>
    </style:style>
    <style:style style:name="T113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14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15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1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17" style:parent-style-name="Hipersaitas" style:family="text">
      <style:text-properties style:font-name="Times New Roman" fo:font-size="14pt" style:font-size-asian="14pt" style:font-size-complex="14pt"/>
    </style:style>
    <style:style style:name="T118" style:parent-style-name="Hipersaitas" style:family="text">
      <style:text-properties style:font-name="Times New Roman" fo:font-size="14pt" style:font-size-asian="14pt" style:font-size-complex="14pt" fo:language="lt" fo:country="LT"/>
    </style:style>
    <style:style style:name="T119" style:parent-style-name="Numatytasispastraiposšriftas" style:family="text">
      <style:text-properties style:font-name="Times New Roman" fo:font-size="14pt" style:font-size-asian="14pt" style:font-size-complex="14pt"/>
    </style:style>
    <style:style style:name="P120" style:parent-style-name="Įprastasis" style:family="paragraph">
      <style:paragraph-properties fo:margin-bottom="0in"/>
    </style:style>
    <style:style style:name="T121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22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23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2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25" style:parent-style-name="Hipersaitas" style:family="text">
      <style:text-properties style:font-name="Times New Roman" fo:font-size="14pt" style:font-size-asian="14pt" style:font-size-complex="14pt" fo:language="lt" fo:country="LT"/>
    </style:style>
    <style:style style:name="T126" style:parent-style-name="Numatytasispastraiposšriftas" style:family="text">
      <style:text-properties style:font-name="Times New Roman" fo:font-weight="bold" style:font-weight-asian="bold" style:font-weight-complex="bold" fo:language="lt" fo:country="LT"/>
    </style:style>
    <style:style style:name="T127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28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129" style:parent-style-name="Įprastasis" style:family="paragraph">
      <style:paragraph-properties fo:margin-bottom="0in"/>
    </style:style>
    <style:style style:name="T130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31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32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33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3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35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36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37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138" style:parent-style-name="Įprastasis" style:family="paragraph">
      <style:text-properties style:font-name="Times New Roman" fo:font-size="14pt" style:font-size-asian="14pt" style:font-size-complex="14pt" fo:language="lt" fo:country="LT"/>
    </style:style>
    <style:style style:name="P139" style:parent-style-name="Įprastasis" style:family="paragraph">
      <style:text-properties style:font-name="Times New Roman" fo:font-size="14pt" style:font-size-asian="14pt" style:font-size-complex="14pt" fo:language="lt" fo:country="LT"/>
    </style:style>
    <style:style style:name="P140" style:parent-style-name="Įprastasis" style:family="paragraph">
      <style:text-properties style:font-name="Times New Roman" fo:font-size="14pt" style:font-size-asian="14pt" style:font-size-complex="14pt" fo:language="lt" fo:country="LT"/>
    </style:style>
    <style:style style:name="P141" style:parent-style-name="Įprastasis" style:family="paragraph">
      <style:text-properties style:font-name="Times New Roman" fo:font-size="14pt" style:font-size-asian="14pt" style:font-size-complex="14pt" fo:language="lt" fo:country="LT"/>
    </style:style>
    <style:style style:name="P142" style:parent-style-name="Įprastasis" style:family="paragraph">
      <style:text-properties style:font-name="Times New Roman" fo:font-size="14pt" style:font-size-asian="14pt" style:font-size-complex="14pt" fo:language="lt" fo:country="LT"/>
    </style:style>
    <style:style style:name="T143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4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145" style:parent-style-name="Sąrašopastraipa" style:list-style-name="LFO2" style:family="paragraph">
      <style:text-properties style:font-name="Times New Roman" fo:font-size="14pt" style:font-size-asian="14pt" style:font-size-complex="14pt" fo:language="lt" fo:country="LT"/>
    </style:style>
    <style:style style:name="P146" style:parent-style-name="Sąrašopastraipa" style:list-style-name="LFO2" style:family="paragraph">
      <style:text-properties style:font-name="Times New Roman" fo:font-size="14pt" style:font-size-asian="14pt" style:font-size-complex="14pt" fo:language="lt" fo:country="LT"/>
    </style:style>
    <style:style style:name="P147" style:parent-style-name="Sąrašopastraipa" style:list-style-name="LFO2" style:family="paragraph">
      <style:text-properties style:font-name="Times New Roman" fo:font-size="14pt" style:font-size-asian="14pt" style:font-size-complex="14pt" fo:language="lt" fo:country="LT"/>
    </style:style>
    <style:style style:name="P148" style:parent-style-name="Sąrašopastraipa" style:list-style-name="LFO1" style:family="paragraph">
      <style:text-properties style:font-name="Times New Roman" fo:font-size="14pt" style:font-size-asian="14pt" style:font-size-complex="14pt" fo:language="lt" fo:country="LT"/>
    </style:style>
    <style:style style:name="T149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50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151" style:parent-style-name="Įprastasis" style:family="paragraph">
      <style:text-properties style:font-name="Times New Roman" fo:font-size="14pt" style:font-size-asian="14pt" style:font-size-complex="14pt" fo:language="lt" fo:country="LT"/>
    </style:style>
    <style:style style:name="P152" style:parent-style-name="Įprastasis" style:family="paragraph">
      <style:text-properties style:font-name="Times New Roman" fo:font-size="14pt" style:font-size-asian="14pt" style:font-size-complex="14pt" fo:language="lt" fo:country="LT"/>
    </style:style>
    <style:style style:name="P153" style:parent-style-name="Įprastasis" style:family="paragraph">
      <style:text-properties style:font-name="Times New Roman" fo:font-size="14pt" style:font-size-asian="14pt" style:font-size-complex="14pt" fo:language="lt" fo:country="LT"/>
    </style:style>
    <style:style style:name="P154" style:parent-style-name="Įprastasis" style:family="paragraph">
      <style:text-properties style:font-name="Times New Roman" fo:font-size="14pt" style:font-size-asian="14pt" style:font-size-complex="14pt" fo:language="lt" fo:country="LT"/>
    </style:style>
  </office:automatic-styles>
  <office:body>
    <office:text text:use-soft-page-breaks="true">
      <text:p text:style-name="P1">LEIDIMŲ IŠĖMIMAS<text:s/>SENIŪNIJOMS<text:s/></text:p>
      <text:p text:style-name="P2"/>
      <text:p text:style-name="P3"/>
      <text:p text:style-name="P4"><text:span text:style-name="T5">Anykščiai:</text:span><text:span text:style-name="T6"><text:tab/></text:span><text:span text:style-name="T7">Siunčiam Daiva Gasiūnienė </text:span><text:a xlink:href="mailto:daiva.gasiuniene@anyksciai.lt" office:target-frame-name="_top" xlink:show="replace"><text:span text:style-name="T19">daiva.gasiuniene@anyksciai.lt</text:span></text:a><text:span text:style-name="T7"> (Architektūros ir urbanistikos sk.)</text:span></text:p>
      <text:p text:style-name="P11"><text:span text:style-name="T12">Biržai:</text:span><text:span text:style-name="T13"><text:tab/></text:span><text:span text:style-name="T14">Siunčiam:</text:span></text:p>
      <text:p text:style-name="P15"><text:span text:style-name="T16"><text:s text:c="10"/></text:span><text:span text:style-name="T17">Biržų mieste:</text:span><text:span text:style-name="T18"><text:s/>Saulius Lapėnas<text:s/></text:span><text:a xlink:href="mailto:saulius.lapenas@birzai.lt" office:target-frame-name="_top" xlink:show="replace"><text:span text:style-name="T19">saulius.lapenas@birzai.lt</text:span></text:a></text:p>
      <text:p text:style-name="P20"><text:span text:style-name="T21">Rajone:</text:span><text:span text:style-name="T22"><text:s/>Rimantas Šikšnys<text:s/></text:span><text:a xlink:href="mailto:rimantas.siksnys@birzai.lt" office:target-frame-name="_top" xlink:show="replace"><text:span text:style-name="T23">rimantas.siksnys@birzai.lt</text:span></text:a><text:span text:style-name="T24"><text:s/></text:span></text:p>
      <text:p text:style-name="P25"><text:span text:style-name="T26">Jonava:</text:span><text:span text:style-name="T27"><text:s/></text:span><text:span text:style-name="T28"><text:tab/></text:span><text:span text:style-name="T29">Siunčiam Renatas Čelutka </text:span><text:a xlink:href="mailto:renatas.celutka@jonava.lt" office:target-frame-name="_top" xlink:show="replace"><text:span text:style-name="T19">renatas.celutka@jonava.lt</text:span></text:a><text:span text:style-name="T29"> (Vyriausiasis inžinierius)</text:span></text:p>
      <text:p text:style-name="P32"><text:span text:style-name="T33">Joniškis:</text:span><text:span text:style-name="T34"><text:s/></text:span><text:span text:style-name="T35"><text:tab/>siunčiam<text:s/></text:span><text:span text:style-name="T36">suderinimui prašymą (seniūnui)</text:span><text:span text:style-name="T37">,gautą prašymą su parašu<text:s/></text:span><text:span text:style-name="T38">persiunčiam<text:s/></text:span><text:span text:style-name="T39">:<text:s/></text:span><text:a xlink:href="mailto:renatas.celutka@joniskis.lt" office:target-frame-name="_top" xlink:show="replace"><text:span text:style-name="T40">renatas.celutka@joniskis.lt</text:span></text:a><text:span text:style-name="T41"><text:s text:c="2"/></text:span></text:p>
      <text:p text:style-name="P42"><text:span text:style-name="T43">Kėdainiai:</text:span><text:span text:style-name="T44"><text:tab/></text:span><text:span text:style-name="T45">Prašymo teikimas per valdžios vartus</text:span><text:span text:style-name="T46"><text:s/></text:span></text:p>
      <text:p text:style-name="P47"><text:span text:style-name="T48">Kupiškis:</text:span><text:span text:style-name="T49"><text:s/></text:span><text:span text:style-name="T50"><text:tab/></text:span><text:span text:style-name="T51">Siunčiam Mažvydas Šalkauskas </text:span><text:a xlink:href="mailto:mazvydas.salkauskas@kupiskis.lt" office:target-frame-name="_top" xlink:show="replace"><text:span text:style-name="T19">mazvydas.salkauskas@kupiskis.lt</text:span></text:a><text:span text:style-name="T51"> (Infrastruktūros skyrius)</text:span></text:p>
      <text:p text:style-name="P54"><text:span text:style-name="T55">Molėtai:</text:span><text:span text:style-name="T56"><text:s text:c="6"/>Siunčiam</text:span><text:span text:style-name="T57"><text:s/></text:span><text:a xlink:href="mailto:rimvydas.pranskus@moletai.lt" office:target-frame-name="_top" xlink:show="replace"><text:span text:style-name="T58">rimvydas.pranskus@moletai.lt</text:span></text:a><text:s/>(su prašymu siunčiam ir garantinio raštą)<text:s text:c="30"/></text:p>
      <text:p text:style-name="P59"><text:span text:style-name="T60">Pakruojis:</text:span><text:span text:style-name="T61"><text:s/></text:span><text:span text:style-name="T62"><text:tab/></text:span><text:span text:style-name="T63">Siunčiam </text:span><text:a xlink:href="mailto:savivaldybe@pakruojis.lt" office:target-frame-name="_top" xlink:show="replace"><text:span text:style-name="T19">savivaldybe@pakruojis.lt</text:span></text:a><text:span text:style-name="T63"> (per atitinkamos seniūnijos seniūną)</text:span></text:p>
      <text:p text:style-name="P66"><text:span text:style-name="T67">Panevėžys:</text:span><text:span text:style-name="T68"><text:tab/></text:span><text:span text:style-name="T69">Siunčiam </text:span><text:a xlink:href="mailto:ukis@panevezys.lt" office:target-frame-name="_top" xlink:show="replace"><text:span text:style-name="T19">ukis@panevezys.lt</text:span></text:a><text:span text:style-name="T69"> (Miesto infrastruktūros skyrius)</text:span></text:p>
      <text:p text:style-name="P70"><text:span text:style-name="T71">Pasvalys:</text:span><text:span text:style-name="T72"><text:tab/></text:span><text:span text:style-name="T73">Siunčiam </text:span><text:a xlink:href="mailto:rastine@pasvalys.lt" office:target-frame-name="_top" xlink:show="replace"><text:span text:style-name="T19">rastine@pasvalys.lt</text:span></text:a><text:span text:style-name="T73"> (Vyriausiasis inžinierius)</text:span></text:p>
      <text:p text:style-name="P74"><text:span text:style-name="T75">Radviliškis:</text:span><text:span text:style-name="T76"><text:tab/><text:s/></text:span><text:span text:style-name="T77">Siunčiam Valdas Miliauskas </text:span><text:a xlink:href="mailto:valdas.miliauskas@radviliskis.lt" office:target-frame-name="_top" xlink:show="replace"><text:span text:style-name="T19">valdas.miliauskas@radviliskis.lt</text:span></text:a><text:span text:style-name="T77"> (Vyriausiasis inžinierius komunaliniam ūkiui)</text:span></text:p>
      <text:p text:style-name="P78"><text:span text:style-name="T79">Raseiniai:</text:span><text:span text:style-name="T80"><text:tab/></text:span><text:span text:style-name="T81">Siunčiam</text:span><text:span text:style-name="T82"><text:s/></text:span><text:a xlink:href="mailto:gintas.brazas@raseiniai.lt" office:target-frame-name="_top" xlink:show="replace"><text:span text:style-name="T83">gintas.brazas@raseiniai.lt</text:span></text:a></text:p>
      <text:p text:style-name="P84"><text:span text:style-name="T85">Rokiškis:</text:span><text:span text:style-name="T86"><text:s/></text:span><text:span text:style-name="T87"><text:tab/></text:span><text:span text:style-name="T88">Siunčiam Arūnas Krasauskas </text:span><text:a xlink:href="mailto:a.krasauskas@rokiskis.lt" office:target-frame-name="_top" xlink:show="replace"><text:span text:style-name="T19">a.krasauskas@rokiskis.lt</text:span></text:a><text:span text:style-name="T88"> (Miesto seniūnas)</text:span></text:p>
      <text:p text:style-name="P89"><text:span text:style-name="T90">Šakiai:</text:span><text:span text:style-name="T91"><text:s/></text:span><text:span text:style-name="T92"><text:tab/></text:span><text:a xlink:href="mailto:lina.rugiene@sakiai.lt" office:target-frame-name="_top" xlink:show="replace"><text:span text:style-name="T93">lina.rugiene@sakiai.lt</text:span></text:a><text:s/></text:p>
      <text:p text:style-name="P94"><text:span text:style-name="T95">Šiauliai:</text:span><text:span text:style-name="T96"><text:tab/></text:span><text:span text:style-name="T97">Siunčiam Jurga Bogusytė </text:span><text:a xlink:href="mailto:jurga.bogusyte@siauliai.lt" office:target-frame-name="_top" xlink:show="replace"><text:span text:style-name="T19">jurga.bogusyte@siauliai.lt</text:span></text:a><text:span text:style-name="T97"> (Infrastruktūros poskyris)</text:span></text:p>
      <text:p text:style-name="P98"><text:span text:style-name="T99">Tauragė:</text:span><text:span text:style-name="T100"><text:tab/></text:span><text:span text:style-name="T101">Prašymo teikimas per valdžios vartus</text:span></text:p>
      <text:p text:style-name="P102"><text:span text:style-name="T103">Ukmergė:</text:span><text:span text:style-name="T104"><text:s/></text:span><text:span text:style-name="T105"><text:tab/></text:span><text:span text:style-name="T106">Prašymo teikimas per valdžios vartus</text:span></text:p>
      <text:p text:style-name="P107"><text:span text:style-name="T108">Utena:</text:span><text:span text:style-name="T109"><text:tab/></text:span><text:span text:style-name="T110">Prašymo teikimas per valdžios vartus</text:span><text:span text:style-name="T111"><text:s/></text:span></text:p>
      <text:p text:style-name="P112"><text:span text:style-name="T113">Vilkaviškis:</text:span><text:span text:style-name="T114"><text:s/></text:span><text:span text:style-name="T115">Siunčiam</text:span><text:span text:style-name="T116"><text:s/></text:span><text:a xlink:href="mailto:savivaldybe@vilkaviskis.lt" office:target-frame-name="_top" xlink:show="replace"><text:span text:style-name="T117">savivaldybe@vilkaviskis.lt</text:span></text:a><text:s/>+<text:a xlink:href="mailto:linas.sapalas@vilkaviskis.lt" office:target-frame-name="_top" xlink:show="replace"><text:span text:style-name="T118">linas.sapalas@vilkaviskis.lt</text:span></text:a><text:span text:style-name="T119">( kai savivaldybė užregistruoja prašyma, Linas jį išduodą) (užtrunka ilgai su išdavimų)</text:span><text:s/></text:p>
      <text:p text:style-name="P120"><text:span text:style-name="T121">Zarasai:</text:span><text:span text:style-name="T122"><text:s/></text:span><text:span text:style-name="T123"><text:tab/></text:span><text:span text:style-name="T124">Siunčiam<text:s/></text:span><text:a xlink:href="mailto:petras.kavolis@zarasai.lt" office:target-frame-name="_top" xlink:show="replace"><text:span text:style-name="T125">petras.kavolis@zarasai.lt</text:span></text:a></text:p>
      <text:p text:style-name="Įprastasis"><text:span text:style-name="T126">ŠVENČIONYS</text:span><text:span text:style-name="T127">:<text:s/></text:span><text:span text:style-name="T128">Prašymo teikimas per valdžios vartus</text:span></text:p>
      <text:p text:style-name="P129"><text:span text:style-name="T130">PAGĖGIAI</text:span><text:span text:style-name="T131">: <text:s/></text:span><text:span text:style-name="T132">Siunčiam Irena Kentrienė </text:span><text:a xlink:href="mailto:i.kentriene@pagegiai.lt" office:target-frame-name="_top" xlink:show="replace"><text:span text:style-name="T19">i.kentriene@pagegiai.lt</text:span></text:a><text:span text:style-name="T132"> (Pagėgių seniūnė, tel. +370 441 57294)</text:span></text:p>
      <text:p text:style-name="Įprastasis"><text:span text:style-name="T133">JURBARKAS:<text:s/></text:span><text:span text:style-name="T134">Siunčiam Romualdas Kuras </text:span><text:a xlink:href="mailto:jurbarkas@jurbarkas.lt" office:target-frame-name="_top" xlink:show="replace"><text:span text:style-name="T19">jurbarkas@jurbarkas.lt</text:span></text:a><text:span text:style-name="T134"> (Jurbarko miesto seniūnas, tel. +370 447 55700)</text:span></text:p>
      <text:p text:style-name="Įprastasis"><text:span text:style-name="T135">IGNALINA</text:span><text:span text:style-name="T136">:<text:s/></text:span><text:span text:style-name="T137">Prašymo teikimas per valdžios vartus<text:s/></text:span></text:p>
      <text:p text:style-name="P138"/>
      <text:p text:style-name="P139"/>
      <text:p text:style-name="P140"/>
      <text:soft-page-break/>
      <text:p text:style-name="P141">KITA INFO</text:p>
      <text:p text:style-name="P142"/>
      <text:p text:style-name="Įprastasis"><text:span text:style-name="T143">Ignalinai būtini dokumetai</text:span><text:span text:style-name="T144">: prašymo forma, Ignalinos perdavimo aktas, Ignalinos garantinis, darbų užbaigimo aktas, brėžiniai/derinimai, apmokėjimas.<text:s/></text:span></text:p>
      <text:list text:style-name="LFO2" text:continue-numbering="true">
        <text:list-item>
          <text:p text:style-name="P145">Per valdžios vartus teikiam prašymo formą, brėžinius/derinimus apmokėjimą ir garantinį.</text:p>
        </text:list-item>
        <text:list-item>
          <text:p text:style-name="P146">Seniūnui prieš pradedant darbus siunčiam perdavimo aktą.</text:p>
        </text:list-item>
        <text:list-item>
          <text:p text:style-name="P147">Dėl gerbūvio siunčiam seniūnui darbų užbaigimo aktą<text:s/></text:p>
        </text:list-item>
      </text:list>
      <text:list text:style-name="LFO1" text:continue-numbering="true">
        <text:list-item>
          <text:p text:style-name="P148">Jei reikia daugiau informacijos kreiptis į<text:s/>marina.volkova@ignalina.lt</text:p>
        </text:list-item>
      </text:list>
      <text:p text:style-name="Įprastasis"><text:span text:style-name="T149">Švenčionys</text:span><text:span text:style-name="T150">: Prašyme nurodyt kiek m2 bus kasama, nuo to priklauso įmoką.</text:span></text:p>
      <text:p text:style-name="P151"/>
      <text:p text:style-name="P152">GERBŪVIAI:<text:s/></text:p>
      <text:p text:style-name="P153">Tik Panevėžiui , Ignalinai, Šiauliams siunčam jų darbų priemimo – perdavimo aktą.<text:s/></text:p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Antraštė1" style:display-name="Antraštė 1" style:family="paragraph" style:parent-style-name="Įprastasis" style:next-style-name="Įprastasis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Antraštė2" style:display-name="Antraštė 2" style:family="paragraph" style:parent-style-name="Įprastasis" style:next-style-name="Įprastasis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Antraštė3" style:display-name="Antraštė 3" style:family="paragraph" style:parent-style-name="Įprastasis" style:next-style-name="Įprastasis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Antraštė4" style:display-name="Antraštė 4" style:family="paragraph" style:parent-style-name="Įprastasis" style:next-style-name="Įprastasis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Antraštė5" style:display-name="Antraštė 5" style:family="paragraph" style:parent-style-name="Įprastasis" style:next-style-name="Įprastasis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Antraštė6" style:display-name="Antraštė 6" style:family="paragraph" style:parent-style-name="Įprastasis" style:next-style-name="Įprastasis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Antraštė7" style:display-name="Antraštė 7" style:family="paragraph" style:parent-style-name="Įprastasis" style:next-style-name="Įprastasis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Antraštė8" style:display-name="Antraštė 8" style:family="paragraph" style:parent-style-name="Įprastasis" style:next-style-name="Įprastasis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Antraštė9" style:display-name="Antraštė 9" style:family="paragraph" style:parent-style-name="Įprastasis" style:next-style-name="Įprastasis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Įprastasis" style:display-name="Įprastasis" style:family="paragraph">
      <style:text-properties fo:hyphenate="false"/>
    </style:style>
    <style:style style:name="Numatytasispastraiposšriftas" style:display-name="Numatytasis pastraipos šriftas" style:family="text"/>
    <style:style style:name="Heading1Char" style:display-name="Heading 1 Char" style:family="text" style:parent-style-name="Numatytasispastraiposšriftas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Numatytasispastraiposšriftas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Numatytasispastraiposšriftas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Numatytasispastraiposšriftas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Numatytasispastraiposšriftas">
      <style:text-properties style:font-name-asian="Times New Roman" style:font-name-complex="Times New Roman" fo:color="#0F4761"/>
    </style:style>
    <style:style style:name="Heading6Char" style:display-name="Heading 6 Char" style:family="text" style:parent-style-name="Numatytasispastraiposšriftas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Numatytasispastraiposšriftas">
      <style:text-properties style:font-name-asian="Times New Roman" style:font-name-complex="Times New Roman" fo:color="#595959"/>
    </style:style>
    <style:style style:name="Heading8Char" style:display-name="Heading 8 Char" style:family="text" style:parent-style-name="Numatytasispastraiposšriftas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Numatytasispastraiposšriftas">
      <style:text-properties style:font-name-asian="Times New Roman" style:font-name-complex="Times New Roman" fo:color="#272727"/>
    </style:style>
    <style:style style:name="Pavadinimas" style:display-name="Pavadinimas" style:family="paragraph" style:parent-style-name="Įprastasis" style:next-style-name="Įprastasis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Numatytasispastraiposšriftas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aantraštė" style:display-name="Paantraštė" style:family="paragraph" style:parent-style-name="Įprastasis" style:next-style-name="Įprastasis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Numatytasispastraiposšriftas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a" style:display-name="Citata" style:family="paragraph" style:parent-style-name="Įprastasis" style:next-style-name="Įprastasis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Numatytasispastraiposšriftas">
      <style:text-properties fo:font-style="italic" style:font-style-asian="italic" style:font-style-complex="italic" fo:color="#404040"/>
    </style:style>
    <style:style style:name="Sąrašopastraipa" style:display-name="Sąrašo pastraipa" style:family="paragraph" style:parent-style-name="Įprastasis">
      <style:paragraph-properties style:contextual-spacing="true" fo:margin-left="0.5in">
        <style:tab-stops/>
      </style:paragraph-properties>
      <style:text-properties fo:hyphenate="false"/>
    </style:style>
    <style:style style:name="Ryškuspabraukimas" style:display-name="Ryškus pabraukimas" style:family="text" style:parent-style-name="Numatytasispastraiposšriftas">
      <style:text-properties fo:font-style="italic" style:font-style-asian="italic" style:font-style-complex="italic" fo:color="#0F4761"/>
    </style:style>
    <style:style style:name="Išskirtacitata" style:display-name="Išskirta citata" style:family="paragraph" style:parent-style-name="Įprastasis" style:next-style-name="Įprastasis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Numatytasispastraiposšriftas">
      <style:text-properties fo:font-style="italic" style:font-style-asian="italic" style:font-style-complex="italic" fo:color="#0F4761"/>
    </style:style>
    <style:style style:name="Ryškinuoroda" style:display-name="Ryški nuoroda" style:family="text" style:parent-style-name="Numatytasispastraiposšriftas">
      <style:text-properties fo:font-weight="bold" style:font-weight-asian="bold" style:font-weight-complex="bold" fo:font-variant="small-caps" fo:color="#0F4761" fo:letter-spacing="0.0034in"/>
    </style:style>
    <style:style style:name="Hipersaitas" style:display-name="Hipersaitas" style:family="text" style:parent-style-name="Numatytasispastraiposšriftas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Neapdorotaspaminėjimas" style:display-name="Neapdorotas paminėjimas" style:family="text" style:parent-style-name="Numatytasispastraiposšriftas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uoda Surkytė</meta:initial-creator>
    <dc:creator>Vilte Kazakeviciene</dc:creator>
    <meta:creation-date>2025-08-29T08:40:00Z</meta:creation-date>
    <dc:date>2026-06-01T05:24:00Z</dc:date>
    <meta:print-date>2026-01-20T10:45:00Z</meta:print-date>
    <meta:template xlink:href="Normal" xlink:type="simple"/>
    <meta:editing-cycles>16</meta:editing-cycles>
    <meta:editing-duration>PT15060S</meta:editing-duration>
    <meta:document-statistic meta:page-count="2" meta:paragraph-count="4" meta:word-count="357" meta:character-count="2394" meta:row-count="17" meta:non-whitespace-character-count="2041"/>
  </office:meta>
</office:document-meta>
</file>